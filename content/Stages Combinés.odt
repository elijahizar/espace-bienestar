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fo:orphans="2" fo:widows="2"/>
      <style:text-properties fo:font-variant="normal" fo:text-transform="none" fo:color="#000000" style:font-name="Helvetica Neue" fo:font-size="12pt" fo:letter-spacing="normal" fo:font-style="normal" fo:font-weight="normal" fo:background-color="#ffffff" loext:padding="0cm" loext:border="none"/>
    </style:style>
    <style:style style:name="P2" style:family="paragraph" style:parent-style-name="Standard">
      <style:paragraph-properties fo:text-align="start" style:justify-single-word="false" fo:orphans="2" fo:widows="2"/>
      <style:text-properties fo:font-variant="normal" fo:text-transform="none" fo:color="#000000" style:font-name="Helvetica Neue" fo:font-size="12pt" fo:letter-spacing="normal" fo:font-style="normal" fo:font-weight="normal" officeooo:paragraph-rsid="00209976" fo:background-color="#ffffff" loext:padding="0cm" loext:border="none"/>
    </style:style>
    <style:style style:name="P3" style:family="paragraph" style:parent-style-name="Standard">
      <style:paragraph-properties fo:text-align="start" style:justify-single-word="false" fo:orphans="2" fo:widows="2"/>
      <style:text-properties fo:font-variant="normal" fo:text-transform="none" fo:color="#000000" style:font-name="Helvetica Neue" fo:font-size="12pt" fo:letter-spacing="normal" fo:font-style="normal" fo:font-weight="normal" officeooo:rsid="001f296d" fo:background-color="#ffffff" loext:padding="0cm" loext:border="none"/>
    </style:style>
    <style:style style:name="P4" style:family="paragraph" style:parent-style-name="Standard">
      <style:paragraph-properties fo:text-align="start" style:justify-single-word="false" fo:orphans="2" fo:widows="2"/>
      <style:text-properties fo:font-variant="normal" fo:text-transform="none" fo:color="#000000" style:font-name="Helvetica Neue" fo:font-size="12pt" fo:letter-spacing="normal" fo:font-style="italic" fo:font-weight="bold" fo:background-color="#ffffff" style:font-style-asian="italic" style:font-weight-asian="bold" style:font-style-complex="italic" style:font-weight-complex="bold" loext:padding="0cm" loext:border="none"/>
    </style:style>
    <style:style style:name="P5" style:family="paragraph" style:parent-style-name="Standard">
      <style:paragraph-properties fo:text-align="start" style:justify-single-word="false" fo:orphans="2" fo:widows="2"/>
      <style:text-properties fo:font-variant="normal" fo:text-transform="none" fo:color="#000000" style:font-name="Helvetica Neue" fo:font-size="12pt" fo:letter-spacing="normal" fo:font-style="italic" fo:font-weight="bold" officeooo:rsid="001f296d" fo:background-color="#ffffff" style:font-style-asian="italic" style:font-weight-asian="bold" style:font-style-complex="italic" style:font-weight-complex="bold" loext:padding="0cm" loext:border="none"/>
    </style:style>
    <style:style style:name="P6" style:family="paragraph" style:parent-style-name="Standard">
      <style:paragraph-properties fo:text-align="start" style:justify-single-word="false" fo:orphans="2" fo:widows="2"/>
      <style:text-properties fo:font-variant="normal" fo:text-transform="none" style:font-name="Helvetica Neue" fo:font-size="12pt" fo:font-style="normal" fo:font-weight="normal" loext:padding="0cm" loext:border="none"/>
    </style:style>
    <style:style style:name="P7" style:family="paragraph" style:parent-style-name="Standard">
      <style:paragraph-properties fo:text-align="start" style:justify-single-word="false" fo:orphans="2" fo:widows="2"/>
      <style:text-properties fo:font-variant="normal" fo:text-transform="none" style:font-name="Helvetica Neue" fo:font-size="12pt" fo:font-style="normal" fo:font-weight="normal" officeooo:paragraph-rsid="00209976" loext:padding="0cm" loext:border="none"/>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Helvetica Neue" fo:font-size="12pt" fo:letter-spacing="normal" fo:font-style="normal" fo:font-weight="normal" fo:background-color="#ffffff" loext:padding="0cm" loext:border="none"/>
    </style:style>
    <style:style style:name="P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Helvetica Neue" fo:font-size="12pt" fo:letter-spacing="normal" fo:font-style="normal" fo:font-weight="normal" officeooo:rsid="001f296d" officeooo:paragraph-rsid="001f296d" fo:background-color="#ffffff" loext:padding="0cm" loext:border="none"/>
    </style:style>
    <style:style style:name="P1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Helvetica Neue" fo:font-size="12pt" fo:letter-spacing="normal" fo:font-style="normal" fo:font-weight="bold" officeooo:rsid="001f296d" officeooo:paragraph-rsid="001f296d" fo:background-color="#ffffff" style:font-weight-asian="bold" style:font-weight-complex="bold" loext:padding="0cm" loext:border="none"/>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Helvetica Neue" fo:font-size="12pt" fo:letter-spacing="normal" fo:font-style="normal" fo:font-weight="bold" officeooo:paragraph-rsid="0021c1f7" fo:background-color="#ffffff" loext:padding="0cm" loext:border="none"/>
    </style:style>
    <style:style style:name="P1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Helvetica Neue" fo:font-size="12pt" fo:letter-spacing="normal" fo:font-style="normal" fo:font-weight="bold" officeooo:rsid="00238a34" officeooo:paragraph-rsid="00238a34" fo:background-color="#ffffff" style:font-size-asian="11pt" style:font-style-asian="italic" style:font-weight-asian="bold" style:font-size-complex="11pt" style:font-style-complex="italic" style:font-weight-complex="bold" loext:padding="0cm" loext:border="none"/>
    </style:style>
    <style:style style:name="P1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Helvetica Neue" fo:font-size="12pt" fo:letter-spacing="normal" fo:font-style="italic" fo:font-weight="bold" officeooo:rsid="001f296d" officeooo:paragraph-rsid="001f296d" fo:background-color="#ffffff" style:font-style-asian="italic" style:font-weight-asian="bold" style:font-style-complex="italic" style:font-weight-complex="bold" loext:padding="0cm" loext:border="none"/>
    </style:style>
    <style:style style:name="P1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Helvetica Neue" fo:font-size="12pt" fo:letter-spacing="normal" fo:font-style="italic" fo:font-weight="bold" officeooo:paragraph-rsid="00209976" fo:background-color="#ffffff" style:font-style-asian="italic" style:font-weight-asian="bold" style:font-style-complex="italic" style:font-weight-complex="bold" loext:padding="0cm" loext:border="none"/>
    </style:style>
    <style:style style:name="P1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fo:letter-spacing="normal" officeooo:paragraph-rsid="00209976" fo:background-color="#ffffff" loext:padding="0cm" loext:border="none"/>
    </style:style>
    <style:style style:name="P1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fo:font-size="13pt" fo:letter-spacing="normal" officeooo:paragraph-rsid="00209976" fo:background-color="#ffffff" style:font-size-asian="13pt" style:font-size-complex="13pt" loext:padding="0cm" loext:border="none"/>
    </style:style>
    <style:style style:name="P1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Helvetica Neue" fo:font-size="11pt" fo:letter-spacing="normal" fo:font-style="italic" fo:font-weight="bold" officeooo:rsid="002178be" officeooo:paragraph-rsid="002178be" fo:background-color="#ffffff" style:font-size-asian="11pt" style:font-style-asian="italic" style:font-weight-asian="bold" style:font-size-complex="11pt" style:font-style-complex="italic" style:font-weight-complex="bold" loext:padding="0cm" loext:border="none"/>
    </style:style>
    <style:style style:name="P1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Helvetica Neue" fo:font-size="12pt" fo:letter-spacing="normal" fo:font-style="normal" fo:font-weight="bold" officeooo:rsid="001f296d" officeooo:paragraph-rsid="00238a34" fo:background-color="#ffffff" style:font-size-asian="11pt" style:font-style-asian="normal" style:font-weight-asian="bold" style:font-size-complex="11pt" style:font-style-complex="normal" style:font-weight-complex="bold" loext:padding="0cm" loext:border="none"/>
    </style:style>
    <style:style style:name="P1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Helvetica Neue" fo:font-size="12pt" fo:letter-spacing="normal" fo:font-style="normal" fo:font-weight="bold" officeooo:rsid="001f296d" officeooo:paragraph-rsid="00243d40" fo:background-color="#ffffff" style:font-weight-asian="bold" style:font-weight-complex="bold" loext:padding="0cm" loext:border="none"/>
    </style:style>
    <style:style style:name="P2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Helvetica Neue" fo:font-size="12pt" fo:letter-spacing="normal" fo:font-style="normal" fo:font-weight="bold" officeooo:rsid="001f296d" officeooo:paragraph-rsid="001f296d" fo:background-color="#ffffff" style:font-weight-asian="bold" style:font-weight-complex="bold" loext:padding="0cm" loext:border="none"/>
    </style:style>
    <style:style style:name="P2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Helvetica Neue" fo:font-size="12pt" fo:letter-spacing="normal" fo:font-style="normal" fo:font-weight="bold" officeooo:paragraph-rsid="0021c1f7" fo:background-color="#ffffff" loext:padding="0cm" loext:border="none"/>
    </style:style>
    <style:style style:name="P2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Helvetica Neue" fo:font-size="12pt" fo:letter-spacing="normal" fo:font-style="normal" fo:font-weight="normal" officeooo:rsid="001f296d" officeooo:paragraph-rsid="00243d40" fo:background-color="#ffffff" loext:padding="0cm" loext:border="none"/>
    </style:style>
    <style:style style:name="P23"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Helvetica Neue" fo:font-size="12pt" fo:letter-spacing="normal" fo:font-style="normal" fo:font-weight="normal" officeooo:rsid="001f296d" officeooo:paragraph-rsid="00243d40" fo:background-color="#ffffff" loext:padding="0cm" loext:border="none"/>
    </style:style>
    <style:style style:name="P24"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Helvetica Neue" fo:font-size="12pt" fo:letter-spacing="normal" fo:font-style="normal" fo:font-weight="normal" officeooo:rsid="00243d40" officeooo:paragraph-rsid="00243d40" fo:background-color="#ffffff" loext:padding="0cm" loext:border="none"/>
    </style:style>
    <style:style style:name="P2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Helvetica Neue" fo:font-size="14pt" fo:letter-spacing="normal" fo:font-style="normal" fo:font-weight="bold" officeooo:rsid="00243d40" officeooo:paragraph-rsid="00243d40" fo:background-color="#ffffff" style:font-size-asian="14pt" style:font-weight-asian="bold" style:font-size-complex="14pt" style:font-weight-complex="bold" loext:padding="0cm" loext:border="none"/>
    </style:style>
    <style:style style:name="P2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fo:font-size="13pt" fo:letter-spacing="normal" officeooo:paragraph-rsid="00209976" fo:background-color="#ffffff" style:font-size-asian="13pt" style:font-size-complex="13pt" loext:padding="0cm" loext:border="none"/>
    </style:style>
    <style:style style:name="T1" style:family="text">
      <style:text-properties officeooo:rsid="00209976"/>
    </style:style>
    <style:style style:name="T2" style:family="text">
      <style:text-properties style:font-name="Helvetica Neue" fo:font-style="normal" fo:font-weight="normal"/>
    </style:style>
    <style:style style:name="T3" style:family="text">
      <style:text-properties style:font-name="Helvetica Neue" fo:font-style="normal" fo:font-weight="normal" officeooo:rsid="00209976"/>
    </style:style>
    <style:style style:name="T4" style:family="text">
      <style:text-properties style:font-name="Helvetica Neue" fo:font-style="normal" fo:font-weight="normal" officeooo:rsid="00238a34"/>
    </style:style>
    <style:style style:name="T5" style:family="text">
      <style:text-properties style:font-name="Helvetica Neue" fo:font-style="normal" fo:font-weight="bold" style:font-weight-asian="bold" style:font-weight-complex="bold"/>
    </style:style>
    <style:style style:name="T6" style:family="text">
      <style:text-properties style:font-name="Helvetica Neue" fo:font-style="normal" fo:font-weight="bold" officeooo:rsid="00209976" style:font-weight-asian="bold" style:font-weight-complex="bold"/>
    </style:style>
    <style:style style:name="T7" style:family="text">
      <style:text-properties style:font-name="Helvetica Neue" fo:font-style="normal" fo:font-weight="bold" officeooo:rsid="00238a34" style:font-weight-asian="bold" style:font-weight-complex="bold"/>
    </style:style>
    <style:style style:name="T8" style:family="text">
      <style:text-properties fo:color="#000000" fo:letter-spacing="normal" fo:background-color="#ffffff" loext:char-shading-value="0"/>
    </style:style>
    <style:style style:name="T9" style:family="text">
      <style:text-properties fo:color="#000000" fo:letter-spacing="normal" officeooo:rsid="00209976" fo:background-color="#ffffff" loext:char-shading-value="0"/>
    </style:style>
    <style:style style:name="T10" style:family="text">
      <style:text-properties fo:font-size="11pt" fo:font-style="italic" fo:font-weight="bold" officeooo:rsid="002178be" style:font-size-asian="11pt" style:font-style-asian="italic" style:font-weight-asian="bold" style:font-size-complex="11pt" style:font-style-complex="italic" style:font-weight-complex="bold"/>
    </style:style>
    <style:style style:name="T11" style:family="text">
      <style:text-properties officeooo:rsid="0021c1f7" style:font-weight-asian="bold" style:font-weight-complex="bold"/>
    </style:style>
    <style:style style:name="T12" style:family="text">
      <style:text-properties officeooo:rsid="001f296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officeooo:rsid="0021c1f7" style:font-weight-asian="bold" style:font-weight-complex="bold"/>
    </style:style>
    <style:style style:name="T15" style:family="text">
      <style:text-properties fo:font-weight="bold" officeooo:rsid="00243d40" style:font-weight-asian="bold" style:font-weight-complex="bold"/>
    </style:style>
    <style:style style:name="T16" style:family="text">
      <style:text-properties officeooo:rsid="00243d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25">Gymnastique Consciente</text:p>
      <text:p text:style-name="P10"><text:s/></text:p>
      <text:p text:style-name="P24"><text:span text:style-name="T14">U</text:span><text:span text:style-name="T13">n dimanche matin par mois</text:span></text:p>
      <text:p text:style-name="P23"><text:span text:style-name="T14">Stages Combinés </text:span><text:span text:style-name="T15">de</text:span><text:span text:style-name="T14"> </text:span><text:span text:style-name="T13">Gymnastique Rythmique Expressive + Gymnastique Posturale</text:span> <text:s/></text:p>
      <text:p text:style-name="P23"/>
      <text:p text:style-name="P19"><text:span text:style-name="T16">de </text:span>10h à 12h30</text:p>
      <text:p text:style-name="P10"/>
      <text:p text:style-name="P10">Salle du Sporting D’Este à Billère 64140</text:p>
      <text:p text:style-name="P9"/>
      <text:p text:style-name="P11"><text:span text:style-name="T12"/></text:p>
      <text:p text:style-name="P11"><text:span text:style-name="T12">Dimanche 202</text:span><text:span text:style-name="T11">6</text:span></text:p>
      <text:p text:style-name="P22">18 Janvier <text:span text:style-name="T10">(Colonne Vertébrale)</text:span> <text:s/></text:p>
      <text:p text:style-name="P22"/>
      <text:p text:style-name="P22">15 Février <text:span text:style-name="T10">(Plexus Racine et Lombo-sacré) </text:span></text:p>
      <text:p text:style-name="P22"><text:span text:style-name="T10"/></text:p>
      <text:p text:style-name="P22">22 Mars <text:span text:style-name="T10">(Plexus Solaire et Cardiaque) </text:span></text:p>
      <text:p text:style-name="P22"><text:span text:style-name="T10"/></text:p>
      <text:p text:style-name="P22">19 Avril <text:span text:style-name="T10">(Plexus Gorge et Front) </text:span></text:p>
      <text:p text:style-name="P22"><text:span text:style-name="T10"/></text:p>
      <text:p text:style-name="P22">10 Mai <text:span text:style-name="T10">(Colonne Vertébrale)</text:span></text:p>
      <text:p text:style-name="P22"><text:span text:style-name="T10"/></text:p>
      <text:p text:style-name="P22">14 Juin <text:span text:style-name="T10">(Plexus Racine et Lombo-sacré)</text:span> </text:p>
      <text:p text:style-name="P22"/>
      <text:p text:style-name="P22"><text:s/>5 Juillet 2026 <text:span text:style-name="T10">(Plexus Solaire et Cardiaque)</text:span></text:p>
      <text:p text:style-name="P17"/>
      <text:p text:style-name="P18"/>
      <text:p text:style-name="P18">Dimanche 2027</text:p>
      <text:p text:style-name="P12">à confirmer</text:p>
      <text:p text:style-name="P15"/>
      <text:p text:style-name="P16"/>
      <text:p text:style-name="P16"> <text:span text:style-name="T5">S</text:span><text:span text:style-name="T6">tage Ple</text:span><text:span text:style-name="T7">x</text:span><text:span text:style-name="T6">us Racine et Lombo-sacré </text:span></text:p>
      <text:p text:style-name="P14">« <text:span text:style-name="T1">Enracinement et Vitalité »</text:span></text:p>
      <text:p text:style-name="P2"/>
      <text:p text:style-name="P7"><text:span text:style-name="T8">Dans ce </text:span><text:span text:style-name="T9">Stage</text:span><text:span text:style-name="T8"> on utilisera la musique du Centre Racine et </text:span><text:span text:style-name="T9">Lombo-sacré</text:span><text:span text:style-name="T8"> pour mobiliser les zones de notre corps en liaison avec la Terre et l'Eau, cherchant à activer notre encrage et notre vitalité </text:span><text:span text:style-name="T9">(l’Eau de Vie)</text:span></text:p>
      <text:p text:style-name="P7"/>
      <text:p text:style-name="P2">Nous travaillerons aussi différentes postures d'étirements et de flexibilité en <text:span text:style-name="T1">résonance</text:span> avec ces Centres Énergétiques.</text:p>
      <text:p text:style-name="P7"/>
      <text:p text:style-name="P2">Des accessoires comme balles, briques,  ceintures et bolsters seront utilisés pour atteindre un état de conscience et de fluidité corporelle. </text:p>
      <text:p text:style-name="P2"/>
      <text:p text:style-name="P2">On bouclera la séance avec la relaxation final et une petite <text:span text:style-name="T1">infusion.</text:span> </text:p>
      <text:p text:style-name="P15"/>
      <text:p text:style-name="P9"/>
      <text:p text:style-name="P9"><text:span text:style-name="T1">Stage</text:span> Plexus Solaire et Cardiaque</text:p>
      <text:p text:style-name="P13"><text:span text:style-name="T1">« Les Portes du Vent et du Soleil »</text:span> </text:p>
      <text:p text:style-name="P8"/>
      <text:p text:style-name="P8"><text:soft-page-break/>Dans cet Stage on utilisera la musique du Centre Plexus Solaire et du Centre Cardiaque pour mobiliser les zones de notre corps en liaison avec le Feu et le Vent, cherchant à activer notre "Petit Sonar" et notre "Être en relation"</text:p>
      <text:p text:style-name="P8"/>
      <text:p text:style-name="P8">Nous travaillerons aussi différentes postures d'étirements et de flexibilité.</text:p>
      <text:p text:style-name="P8">Des accessoires comme des briques, bolsters, ceintures er ballons, seront utilisés pour atteindre un état de conscience et de fluidité corporelle.</text:p>
      <text:p text:style-name="P8"/>
      <text:p text:style-name="P8">On <text:span text:style-name="T16">bouclera</text:span> la séance avec la relaxation final et une petite infusion.</text:p>
      <text:p text:style-name="P8"/>
      <text:p text:style-name="P8"/>
      <text:p text:style-name="P8"/>
      <text:p text:style-name="P1"/>
      <text:p text:style-name="P1"/>
      <text:p text:style-name="P1"/>
      <text:p text:style-name="P3"/>
      <text:p text:style-name="P3">Stage Plexus Gorge et Front</text:p>
      <text:p text:style-name="P4">« La Voix de la Sagesse » </text:p>
      <text:p text:style-name="P6"/>
      <text:p text:style-name="P1">Dans ce Stage on utilisera la musique du Centre Gorge pour mobiliser les zones de notre corps en liaison avec l'Espace Intérieur, cherchant à activer notre respiration pour purifier notre esprit.</text:p>
      <text:p text:style-name="P6"/>
      <text:p text:style-name="P1">Nous travaillerons aussi différentes postures d'étirements et de flexibilité.</text:p>
      <text:p text:style-name="P1">Des accessoires comme des briques, bolsters et ceintures, seront utilisés pour atteindre un état de conscience et de fluidité corporelle.</text:p>
      <text:p text:style-name="P6"/>
      <text:p text:style-name="P1">On buclera la séance avec un moment de méditation, la relaxation final et une petite infusion.</text:p>
      <text:p text:style-name="P6"/>
      <text:p text:style-name="P1"/>
      <text:p text:style-name="P3">Stage Décompresser la Colonne Vertébrale <text:s/></text:p>
      <text:p text:style-name="P5">"Un besoin de liberté "</text:p>
      <text:p text:style-name="P6"/>
      <text:p text:style-name="P1">La Colonne Vertébrale est notre Axe Centrale, on peut l'appeler aussi le Pilier de la Vie qui relie les extrémités de notre corps et fonctionne comme un lien entre la Terre et le Ciel.</text:p>
      <text:p text:style-name="P6"/>
      <text:p text:style-name="P1">Dans de nombreuses traditions spirituelles la Colonne <text:span text:style-name="T1">Vertébrale</text:span> est bien plus qu'un axe physique, elle est est un canal où circule l'énergie terrestre liées à l'ancrage, aux besoins matériels et à la sécurité et l'énergie <text:span text:style-name="T1">céleste</text:span>, tournée vers la créativité, la spiritualité et l'élévation.</text:p>
      <text:p text:style-name="P6"/>
      <text:p text:style-name="P1">Dans cet Stage nous travaillerons différentes postures et exercices de flexibilité et d'étirement pour la décompresses et soulages nos douleurs physiques et nous libérer des tensions psychique.</text:p>
      <text:p text:style-name="P6"/>
      <text:p text:style-name="P1">On bouclera le Stage avec la relaxation finale et une petite <text:span text:style-name="T1">infusion.</text:span></text:p>
      <text:p text:style-name="P1"/>
      <text:p text:style-name="P6"/>
      <text:p text:style-name="P1"/>
      <text:p text:style-name="P6"/>
      <text:p text:style-name="P1"/>
      <text:p text:style-name="Standard"><text:soft-pag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6-03-28T12:41:56.516000000</meta:creation-date>
    <dc:date>2026-04-28T19:04:04.082000000</dc:date>
    <meta:editing-duration>PT10M41S</meta:editing-duration>
    <meta:editing-cycles>3</meta:editing-cycles>
    <meta:generator>LibreOffice/6.0.6.2$Windows_X86_64 LibreOffice_project/0c292870b25a325b5ed35f6b45599d2ea4458e77</meta:generator>
    <meta:document-statistic meta:table-count="0" meta:image-count="0" meta:object-count="0" meta:page-count="3" meta:paragraph-count="41" meta:word-count="478" meta:character-count="3033" meta:non-whitespace-character-count="2574"/>
  </office:meta>
</office:document-meta>
</file>