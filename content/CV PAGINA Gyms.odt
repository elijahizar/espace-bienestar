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, ui-serif, Georgia, Cambria, 'Times New Roman', Times, serif"/>
    <style:font-face style:name="Jost" svg:font-family="Jost, 'Source Sans Pro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323cm" fo:margin-right="1.323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464e67" style:font-name="Jost" fo:font-size="21pt" fo:letter-spacing="normal" fo:font-style="normal" fo:font-weight="normal" officeooo:rsid="000bac3f" officeooo:paragraph-rsid="000bac3f" loext:padding="0cm" loext:border="none"/>
    </style:style>
    <style:style style:name="P2" style:family="paragraph" style:parent-style-name="Text_20_body">
      <style:paragraph-properties fo:margin-left="1.323cm" fo:margin-right="1.323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464e67" style:font-name="Jost" fo:font-size="12pt" fo:letter-spacing="normal" fo:font-style="normal" fo:font-weight="normal" officeooo:rsid="00185efb" officeooo:paragraph-rsid="000ed504" loext:padding="0cm" loext:border="none"/>
    </style:style>
    <style:style style:name="P3" style:family="paragraph" style:parent-style-name="Text_20_body">
      <style:paragraph-properties fo:margin-left="0cm" fo:margin-right="1.323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464e67" fo:letter-spacing="normal" officeooo:paragraph-rsid="00185efb"/>
    </style:style>
    <style:style style:name="P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officeooo:paragraph-rsid="0006093c"/>
    </style:style>
    <style:style style:name="P5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212427" style:font-name="Alegreya" fo:font-size="15pt" fo:letter-spacing="normal" fo:font-style="normal" fo:font-weight="normal" officeooo:rsid="0006093c" officeooo:paragraph-rsid="0006093c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464e67" style:font-name="Jost" fo:font-size="21pt" fo:letter-spacing="normal" fo:language="fr" fo:country="FR" fo:font-style="normal" fo:font-weight="normal" officeooo:rsid="00083179" officeooo:paragraph-rsid="0006093c" loext:padding="0cm" loext:border="non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464e67" style:font-name="Jost" fo:font-size="21pt" fo:letter-spacing="normal" fo:language="fr" fo:country="FR" fo:font-style="normal" fo:font-weight="normal" officeooo:rsid="0008dc5d" officeooo:paragraph-rsid="0006093c" loext:padding="0cm" loext:border="none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212427" style:font-name="Alegreya" fo:font-size="15pt" fo:letter-spacing="normal" fo:language="fr" fo:country="FR" fo:font-style="normal" fo:font-weight="normal" officeooo:rsid="0006093c" officeooo:paragraph-rsid="0006093c" loext:padding="0cm" loext:border="none"/>
    </style:style>
    <style:style style:name="P9" style:family="paragraph" style:parent-style-name="Text_20_body">
      <style:paragraph-properties fo:margin-left="1.323cm" fo:margin-right="1.323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464e67" style:font-name="Jost" fo:font-size="21pt" fo:letter-spacing="normal" fo:font-style="normal" fo:font-weight="normal" officeooo:rsid="00193f18" officeooo:paragraph-rsid="000ed504" loext:padding="0cm" loext:border="none"/>
    </style:style>
    <style:style style:name="T1" style:family="text">
      <style:text-properties fo:font-variant="normal" fo:text-transform="none" fo:color="#464e67" style:font-name="Jost" fo:font-size="21pt" fo:letter-spacing="normal" fo:font-style="normal" fo:font-weight="normal"/>
    </style:style>
    <style:style style:name="T2" style:family="text">
      <style:text-properties fo:font-variant="normal" fo:text-transform="none" fo:color="#464e67" style:font-name="Jost" fo:font-size="21pt" fo:letter-spacing="normal" fo:font-style="normal" fo:font-weight="normal" officeooo:rsid="00193f18"/>
    </style:style>
    <style:style style:name="T3" style:family="text">
      <style:text-properties fo:font-variant="normal" fo:text-transform="none" fo:color="#464e67" style:font-name="Jost" fo:font-size="21pt" fo:letter-spacing="normal" fo:font-style="normal" fo:font-weight="normal" officeooo:rsid="0006093c"/>
    </style:style>
    <style:style style:name="T4" style:family="text">
      <style:text-properties fo:font-variant="normal" fo:text-transform="none" fo:color="#464e67" style:font-name="Jost" fo:font-size="21pt" fo:letter-spacing="normal" fo:font-style="normal" fo:font-weight="normal" officeooo:rsid="00064f41"/>
    </style:style>
    <style:style style:name="T5" style:family="text">
      <style:text-properties fo:font-variant="normal" fo:text-transform="none" fo:color="#464e67" style:font-name="Jost" fo:font-size="21pt" fo:letter-spacing="normal" fo:font-style="normal" fo:font-weight="normal" officeooo:rsid="00083179"/>
    </style:style>
    <style:style style:name="T6" style:family="text">
      <style:text-properties fo:font-variant="normal" fo:text-transform="none" fo:color="#464e67" style:font-name="Jost" fo:font-size="21pt" fo:letter-spacing="normal" fo:font-style="normal" fo:font-weight="normal" officeooo:rsid="000d6c74"/>
    </style:style>
    <style:style style:name="T7" style:family="text">
      <style:text-properties fo:font-variant="normal" fo:text-transform="none" fo:color="#212427" style:font-name="Alegreya" fo:font-size="15pt" fo:letter-spacing="normal" fo:font-style="normal" fo:font-weight="normal" officeooo:rsid="0006093c"/>
    </style:style>
    <style:style style:name="T8" style:family="text">
      <style:text-properties fo:font-size="21pt"/>
    </style:style>
    <style:style style:name="T9" style:family="text">
      <style:text-properties fo:font-size="21pt" officeooo:rsid="001b25fc"/>
    </style:style>
    <style:style style:name="T10" style:family="text">
      <style:text-properties fo:font-size="21pt" officeooo:rsid="00193f18"/>
    </style:style>
    <style:style style:name="T11" style:family="text">
      <style:text-properties fo:font-size="21pt" officeooo:rsid="0006093c"/>
    </style:style>
    <style:style style:name="T12" style:family="text">
      <style:text-properties fo:font-size="21pt" officeooo:rsid="00064f41"/>
    </style:style>
    <style:style style:name="T13" style:family="text">
      <style:text-properties fo:font-size="21pt" officeooo:rsid="000bac3f"/>
    </style:style>
    <style:style style:name="T14" style:family="text">
      <style:text-properties fo:font-size="21pt" officeooo:rsid="000ed5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e m’appelle Sonia Cutri, je suis née en Argentine, nationalisée espagnole. </text:p>
      <text:p text:style-name="P9"/>
      <text:p text:style-name="P2"><text:span text:style-name="T10">Après le Lycée spécialisation éducatrice, j’ai fait trois années universitaires dans la carrière de Science de l’Éducation à Buenos Aires et ensuite j’ai passé le concours <text:s/>à l’École d’Art Dramatique où j’ai été diplômée comme comédienne et </text:span><text:span text:style-name="T14">m</text:span><text:span text:style-name="T10">onitrice du Technique du Mouvement. </text:span></text:p>
      <text:p text:style-name="P9">Des années après, j’ai passé à nouveau le concours pour être admise dans la carrière de Metteur en Scène, d’où je suis sortie diplômée.</text:p>
      <text:p text:style-name="P9"/>
      <text:p text:style-name="P2"><text:span text:style-name="T10">Au long de mon parcours de vie et en tant que comédienne et metteur en scène, je me suis intéressée à expérimenter différentes approches de travail corporel telles que le Hatha yoga, la Technique Alexander, la danse théâtre, <text:s/>les techniques mixtes de danse classique, Graham, Barre à Terre, des différents types d’entraînement pour l’acteur, </text:span><text:span text:style-name="T9">compris <text:s/>dans le</text:span><text:span text:style-name="T10"> Théâtre Anthropologique, <text:s/></text:span><text:span text:style-name="T8">la Technique Rythmique Expressive de Centres </text:span><text:soft-page-break/><text:span text:style-name="T10">d’énergie</text:span><text:span text:style-name="T8"> et </text:span><text:span text:style-name="T11">le</text:span><text:span text:style-name="T10"> </text:span><text:span text:style-name="T8"><text:s/>Yoga Iyengar, </text:span><text:span text:style-name="T13">discipline</text:span><text:span text:style-name="T12"> </text:span><text:span text:style-name="T13">que </text:span><text:span text:style-name="T12">j’</text:span><text:span text:style-name="T13">ai continué à pratiquer </text:span><text:span text:style-name="T12"><text:s/></text:span><text:span text:style-name="T13">en France.</text:span></text:p>
      <text:p text:style-name="P1">Dans l’actualité je pratique aussi le Qi-Gong </text:p>
      <text:p text:style-name="P3"/>
      <text:p text:style-name="P4"><text:span text:style-name="T4">C’est </text:span><text:span text:style-name="T2"><text:s/></text:span><text:span text:style-name="T5">pourquoi</text:span><text:span text:style-name="T2"> mon</text:span><text:span text:style-name="T1"> enseignement </text:span><text:span text:style-name="T3">corporel</text:span><text:span text:style-name="T1"> comporte une synthèse personnelle fruit de </text:span><text:span text:style-name="T2">mon </text:span><text:span text:style-name="T3">propre</text:span><text:span text:style-name="T2"> </text:span><text:span text:style-name="T1">expérience</text:span><text:span text:style-name="T3"> et qui m’a permis lors de ma trajectoire comme Monitrice de </text:span><text:span text:style-name="T6">Gymnastique <text:s/>Consciente</text:span><text:span text:style-name="T3"> apprendre pas seulement ce que je sais, mais aussi ce que je suis. <text:s/></text:span><text:span text:style-name="T7"><text:s/></text:span></text:p>
      <text:p text:style-name="P5"/>
      <text:p text:style-name="P8"><text:tab/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, ui-serif, Georgia, Cambria, 'Times New Roman', Times, serif"/>
    <style:font-face style:name="Jost" svg:font-family="Jost, 'Source Sans Pro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7T19:16:46.679000000</meta:creation-date>
    <dc:date>2026-04-28T19:19:37.292000000</dc:date>
    <meta:editing-duration>PT18M25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7" meta:word-count="202" meta:character-count="1309" meta:non-whitespace-character-count="1098"/>
  </office:meta>
</office:document-meta>
</file>