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ost" svg:font-family="Jost, 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4af3" officeooo:paragraph-rsid="001b4af3"/>
    </style:style>
    <style:style style:name="P2" style:family="paragraph" style:parent-style-name="Standard">
      <style:text-properties fo:font-variant="normal" fo:text-transform="none" fo:color="#526295" style:font-name="Jost" fo:font-size="18pt" fo:letter-spacing="normal" fo:font-style="normal" fo:font-weight="normal" officeooo:rsid="001b4af3" officeooo:paragraph-rsid="001b4af3"/>
    </style:style>
    <style:style style:name="P3" style:family="paragraph" style:parent-style-name="Standard">
      <style:text-properties fo:font-variant="normal" fo:text-transform="none" fo:color="#526295" style:font-name="Jost" fo:font-size="18pt" fo:letter-spacing="normal" fo:font-style="normal" fo:font-weight="bold" officeooo:rsid="001c0355" officeooo:paragraph-rsid="001c0355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000000" style:font-name="Jost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1f309b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paragraph-rsid="002023cb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/>
    </style:style>
    <style:style style:name="T1" style:family="text">
      <style:text-properties fo:color="#526295" fo:font-size="18pt"/>
    </style:style>
    <style:style style:name="T2" style:family="text">
      <style:text-properties fo:color="#526295" fo:font-size="18pt" officeooo:rsid="001d8dc7"/>
    </style:style>
    <style:style style:name="T3" style:family="text">
      <style:text-properties fo:color="#526295" fo:font-size="18pt" officeooo:rsid="001f309b"/>
    </style:style>
    <style:style style:name="T4" style:family="text">
      <style:text-properties officeooo:rsid="001c0355"/>
    </style:style>
    <style:style style:name="T5" style:family="text">
      <style:text-properties fo:color="#000000" fo:font-size="10.5pt"/>
    </style:style>
    <style:style style:name="T6" style:family="text">
      <style:text-properties officeooo:rsid="002023cb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2183e1"/>
    </style:style>
    <style:style style:name="T9" style:family="text">
      <style:text-properties officeooo:rsid="0021d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Les </text:span>Gymnastique<text:span text:style-name="T6">s</text:span> Consciente<text:span text:style-name="T6">s</text:span></text:p>
      <text:p text:style-name="P2"/>
      <text:p text:style-name="P1"/>
      <text:p text:style-name="P4">Avec <text:span text:style-name="T4">les Gymnastiques Consciente</text:span>, vous allez progressivement apprendre à vous détendre et avoir une meilleure connaissance de vos ressources corporelles<text:span text:style-name="T5"><text:line-break/></text:span><text:span text:style-name="T4">La pratique d</text:span>e différents exercices de tonicité, de flexibilité et de détente <text:span text:style-name="T4">réalisés consciemment </text:span><text:s/>vous permettra de corriger vos mauvaises postures et d'élargir vos possibilités de mouvement.</text:p>
      <text:p text:style-name="P6"> </text:p>
      <text:p text:style-name="P7">Ce<text:span text:style-name="T6">s deux</text:span> gymnastique<text:span text:style-name="T6">s</text:span> <text:span text:style-name="T9">tiennent</text:span> compte de la relation étroite entre le corps et l'esprit et c'est pour cette raison que l<text:span text:style-name="T6">es deux modalités d’ateliers adaptés à vos préférences, vous <text:s/></text:span>propose une pratique corporelle qui stimule<text:span text:style-name="T6">nt</text:span> les participants à mieux percevoir et comprendre leur corps comme une entité intégrée.</text:p>
      <text:p text:style-name="P4"/>
      <text:p text:style-name="P5"><text:span text:style-name="T1">Avec la pratique régulière les tensions se relâchent, </text:span><text:span text:style-name="T2">la flexibilité </text:span><text:span text:style-name="T3">revient,</text:span><text:span text:style-name="T2"> </text:span><text:span text:style-name="T3">les mouvements s’élargissent </text:span><text:span text:style-name="T1"><text:s/>et vous retrouvez ainsi une meilleure tonicité et posture générale.</text:span></text:p>
      <text:p text:style-name="P4"/>
      <text:p text:style-name="P4">La pratique est accessible à tous <text:span text:style-name="T6">et à toutes, </text:span>sans limite d'âge.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ost" svg:font-family="Jost, 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15T12:31:54.044000000</meta:creation-date>
    <dc:date>2026-04-28T19:29:33.803000000</dc:date>
    <meta:editing-duration>PT1H24M29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6" meta:word-count="134" meta:character-count="930" meta:non-whitespace-character-count="797"/>
  </office:meta>
</office:document-meta>
</file>