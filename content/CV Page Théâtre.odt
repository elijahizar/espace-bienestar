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ost" svg:font-family="Jost, 'Source Sans Pro',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64e67" fo:letter-spacing="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3" style:family="paragraph" style:parent-style-name="Text_20_body">
      <style:paragraph-properties fo:margin-left="0cm" fo:margin-right="1.323cm" fo:margin-top="0cm" fo:margin-bottom="0cm" loext:contextual-spacing="false" fo:text-align="start" style:justify-single-word="false" fo:text-indent="0cm" style:auto-text-indent="false"/>
      <style:text-properties fo:font-variant="normal" fo:text-transform="none" fo:color="#464e67" style:font-name="Jost" fo:font-size="21pt" fo:letter-spacing="normal" fo:font-style="normal" fo:font-weight="normal" officeooo:rsid="00108bad" officeooo:paragraph-rsid="0012d0aa"/>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64e67" style:font-name="Jost" fo:font-size="21pt" fo:letter-spacing="normal" fo:font-style="normal" fo:font-weight="normal" officeooo:rsid="00108bad"/>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64e67" style:font-name="Jost" fo:font-size="21pt" fo:letter-spacing="normal" fo:font-style="normal" fo:font-weight="normal" officeooo:rsid="00108bad" officeooo:paragraph-rsid="0015ed63"/>
    </style:style>
    <style:style style:name="T1" style:family="text">
      <style:text-properties style:font-name="Jost" fo:font-size="21pt" fo:font-style="normal" fo:font-weight="normal" officeooo:rsid="00108bad"/>
    </style:style>
    <style:style style:name="T2" style:family="text">
      <style:text-properties officeooo:rsid="001614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Je m’appelle Sonia Cutri, je suis née en Argentine, nationalisée espagnole. </text:p>
      <text:p text:style-name="P5">Après le Lycée spécialisation éducatrice, j’ai fait trois années universitaires dans la carrière de Science de l’Éducation à Buenos Aires et ensuite j’ai passé le concours <text:s/>à l’École d’Art Dramatique où j’ai été diplômée comme comédienne et monitrice du Technique du Mouvement. </text:p>
      <text:p text:style-name="P5">Des années après, j’ai passé à nouveau le concours pour être admise dans la carrière de Metteur en Scène, d’où je suis sortie diplômée.</text:p>
      <text:p text:style-name="P4"/>
      <text:p text:style-name="P4">En France, j’ai obtenu le DU/Certificat International d’Écologie Humaine à l’Université de Pau et des Pays de l'Adour, Faculté des Lettres et Sciences Humaines, ainsi que j’ai suivi la formation à la Sensibilisation de l’Analyse de Groupe et Psychodrame à l'IFAG, Institut Français d'Analyse de Groupe et Psychodrame (Paris-Bordeaux)</text:p>
      <text:p text:style-name="P4"><text:s/></text:p>
      <text:p text:style-name="P1"><text:span text:style-name="T1">En Argentine, Buenos Aires, j'ai travaillé comme éducatrice de théâtre dans l'Institut pour la Vocation Artistique (IVA) où j’ai enseigné pendant dix ans </text:span><text:soft-page-break/><text:span text:style-name="T1">l'Éducation par Intermédiaire de l'Art. J'ai aussi travaillé comme actrice, metteuse en scène et scénariste pour la télévision.</text:span></text:p>
      <text:p text:style-name="P4">En France j’ai <text:s/>joué <text:s/>et dirigé <text:span text:style-name="T2">nombreuses</text:span> pièces de théâtre, performances et récitals poétiques.</text:p>
      <text:p text:style-name="P4"/>
      <text:p text:style-name="P4">J’ai intervenu comme éducatrice de théâtre et comme metteuse en scène dans différentes écoles et collèges de la région paloise et j’ai réalisé des stages de théâtre pour adultes dans le domaine libéral.</text:p>
      <text:p text:style-name="P4"><text:s/></text:p>
      <text:p text:style-name="P4">J’ai travaillé aussi comme intervenante théâtrale pour la formation d'Aide Médico-Psychologique, Dynamique Emploi, Moniteur Éducateur et Éducateur Spécialisé au Centre de Formation Développement d'Etcharry, <text:s/>à l’Institut de Travail Social (ITS) à Pau et aussi dans l’Association ATS (A tout Service) à Mourenx et Orthez.</text:p>
      <text:p text:style-name="P4"/>
      <text:p text:style-name="P4">Dans l’Espace Bienestar, je coordonne un Atelier de Théâtre et Bien-Être pour des personnes souffrant de troubles <text:span text:style-name="T2">d’anxiété</text:span>, de phobie sociale, de timidité excessive, de problèmes d’insertion au travail, d’épuisement professionnel ou burn-out, ainsi qu’un Atelier pour les <text:s/>Amateurs du Théâtre.</text:p>
      <text:p text:style-name="P1"><text:soft-page-break/>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ost" svg:font-family="Jost, 'Source Sans Pro',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12T12:54:32.838000000</meta:creation-date>
    <dc:date>2026-04-28T19:10:59.944000000</dc:date>
    <meta:editing-duration>PT30M38S</meta:editing-duration>
    <meta:editing-cycles>7</meta:editing-cycles>
    <meta:generator>LibreOffice/6.0.6.2$Windows_X86_64 LibreOffice_project/0c292870b25a325b5ed35f6b45599d2ea4458e77</meta:generator>
    <meta:document-statistic meta:table-count="0" meta:image-count="0" meta:object-count="0" meta:page-count="3" meta:paragraph-count="12" meta:word-count="299" meta:character-count="2019" meta:non-whitespace-character-count="1719"/>
  </office:meta>
</office:document-meta>
</file>