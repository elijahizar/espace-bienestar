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ost" svg:font-family="Jost, 'Source Sans Pro', sans-serif"/>
    <style:font-face style:name="verdana" svg:font-family="verdana, genev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officeooo:paragraph-rsid="00096d2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/>
      <style:text-properties officeooo:paragraph-rsid="00096d2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paragraph-rsid="000c0d27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847cm" fo:text-align="justify" style:justify-single-word="false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justify" style:justify-single-word="false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paragraph-rsid="0012e309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rsid="000c0d27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rsid="000c0d27" officeooo:paragraph-rsid="000d25a4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rsid="000c0d27" officeooo:paragraph-rsid="00135d31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rsid="000c0d27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847cm" fo:text-align="justify" style:justify-single-word="false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rsid="0012e309" officeooo:paragraph-rsid="0012e309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bold" officeooo:rsid="000c0d27" officeooo:paragraph-rsid="000d25a4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bold" officeooo:rsid="0012e309" officeooo:paragraph-rsid="0012e309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464e67" fo:letter-spacing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635cm" fo:text-align="center" style:justify-single-word="false" fo:orphans="2" fo:widows="2" fo:text-indent="0cm" style:auto-text-indent="false"/>
    </style:style>
    <style:style style:name="P15" style:family="paragraph" style:parent-style-name="Standard">
      <style:text-properties fo:font-variant="normal" fo:text-transform="none" fo:color="#526295" style:font-name="Jost" fo:font-size="18pt" fo:letter-spacing="normal" fo:font-style="normal" fo:font-weight="normal" officeooo:rsid="000c0d27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color="#526295" style:font-name="Jost" fo:font-size="18pt" fo:letter-spacing="normal" fo:font-style="normal" fo:font-weight="normal" officeooo:rsid="000c0d27" officeooo:paragraph-rsid="0010e9c4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74fac"/>
    </style:style>
    <style:style style:name="T1" style:family="text">
      <style:text-properties fo:font-variant="normal" fo:text-transform="none" fo:color="#526295" style:font-name="Jost" fo:font-size="15pt" fo:letter-spacing="normal" fo:font-style="normal" fo:font-weight="bold" officeooo:rsid="00096d2e"/>
    </style:style>
    <style:style style:name="T2" style:family="text">
      <style:text-properties fo:font-variant="normal" fo:text-transform="none" fo:color="#526295" style:font-name="Jost" fo:font-size="15pt" fo:letter-spacing="normal" fo:font-style="normal" fo:font-weight="bold" officeooo:rsid="000ffed2"/>
    </style:style>
    <style:style style:name="T3" style:family="text">
      <style:text-properties fo:font-variant="normal" fo:text-transform="none" fo:color="#526295" style:font-name="Jost" fo:font-size="18pt" fo:letter-spacing="normal" fo:font-style="normal" fo:font-weight="normal" officeooo:rsid="000c0d27"/>
    </style:style>
    <style:style style:name="T4" style:family="text">
      <style:text-properties fo:font-variant="normal" fo:text-transform="none" fo:color="#526295" style:font-name="Jost" fo:font-size="18pt" fo:letter-spacing="normal" fo:font-style="normal" fo:font-weight="normal" officeooo:rsid="0010e9c4"/>
    </style:style>
    <style:style style:name="T5" style:family="text">
      <style:text-properties fo:font-variant="normal" fo:text-transform="none" fo:color="#5b6686" style:font-name="verdana" fo:font-size="13.5pt" fo:letter-spacing="normal" fo:font-style="normal" fo:font-weight="bold"/>
    </style:style>
    <style:style style:name="T6" style:family="text">
      <style:text-properties fo:font-variant="normal" fo:text-transform="none" fo:color="#5b6686" style:font-name="verdana" fo:font-size="13.5pt" fo:letter-spacing="normal" fo:font-style="italic" fo:font-weight="bold" officeooo:rsid="000ffed2" style:font-style-asian="italic" style:font-style-complex="italic"/>
    </style:style>
    <style:style style:name="T7" style:family="text">
      <style:text-properties fo:font-variant="normal" fo:text-transform="none" fo:color="#464e67" style:font-name="Jost" fo:font-size="21pt" fo:letter-spacing="normal" fo:font-style="normal" fo:font-weight="normal" officeooo:rsid="00108bad"/>
    </style:style>
    <style:style style:name="T8" style:family="text">
      <style:text-properties fo:font-variant="normal" fo:text-transform="none" fo:color="#464e67" style:font-name="Jost" fo:font-size="21pt" fo:letter-spacing="normal" fo:font-style="normal" fo:font-weight="normal" officeooo:rsid="0016146f"/>
    </style:style>
    <style:style style:name="T9" style:family="text">
      <style:text-properties officeooo:rsid="000aed07"/>
    </style:style>
    <style:style style:name="T10" style:family="text">
      <style:text-properties officeooo:rsid="000c0d27"/>
    </style:style>
    <style:style style:name="T11" style:family="text">
      <style:text-properties fo:font-weight="normal"/>
    </style:style>
    <style:style style:name="T12" style:family="text">
      <style:text-properties fo:font-weight="normal" officeooo:rsid="0010e9c4"/>
    </style:style>
    <style:style style:name="T13" style:family="text">
      <style:text-properties officeooo:rsid="0010e2f7"/>
    </style:style>
    <style:style style:name="T14" style:family="text">
      <style:text-properties officeooo:rsid="0010e9c4"/>
    </style:style>
    <style:style style:name="T15" style:family="text">
      <style:text-properties officeooo:rsid="0012e309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12e309" style:font-style-asian="normal" style:font-weight-asian="normal" style:font-style-complex="normal" style:font-weight-complex="normal"/>
    </style:style>
    <style:style style:name="T18" style:family="text">
      <style:text-properties officeooo:rsid="00174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1"><text:s/></text:span></text:span><text:span text:style-name="Emphasis"><text:span text:style-name="T2">(Présentation)</text:span></text:span></text:p>
      <text:p text:style-name="P1"><text:span text:style-name="Emphasis"><text:span text:style-name="T2"/></text:span></text:p>
      <text:p text:style-name="P2"><text:span text:style-name="Emphasis"><text:span text:style-name="T6">"Le Théâtre peut être le lieu où il semble que quelque chose se passe"</text:span></text:span></text:p>
      <text:p text:style-name="P14"><text:span text:style-name="Emphasis"><text:span text:style-name="T5"/></text:span></text:p>
      <text:p text:style-name="P14"><text:span text:style-name="Emphasis"><text:span text:style-name="T5">Eugène Ionesco</text:span></text:span></text:p>
      <text:p text:style-name="P2"><text:span text:style-name="Emphasis"><text:span text:style-name="T2"/></text:span></text:p>
      <text:p text:style-name="P1"><text:span text:style-name="Emphasis"><text:span text:style-name="T1"/></text:span></text:p>
      <text:p text:style-name="P3">Bien sûr, nous pouvons affirmer que dans toutes les <text:s/>activités artistiques l’inconscient s’exprime et dévoile la profondeur de la nature humaine, mais ce qui différencie le Théâtre des autres <text:s/>domaines des <text:span text:style-name="T9">a</text:span>rts, c’est que dans le théâtre la <text:span text:style-name="T13">présence corporel sur scène</text:span>, entendue comme histoire, comme subjectivité, <text:span text:style-name="T13">comme langage, </text:span>c’est la matière première et directe sur laquelle la personne même travaille.</text:p>
      <text:p text:style-name="P3"/>
      <text:p text:style-name="P3"><text:span text:style-name="T10">Sur les trois dimension de la scène</text:span>, <text:span text:style-name="T10">le comédien/ne <text:s/></text:span>devient l’artiste de soi-même, <text:span text:style-name="T13">il </text:span>découvre des aptitudes qu’il ignorait <text:span text:style-name="T10">avoir </text:span>et <text:s/>retrouve grâce <text:span text:style-name="T10">au jeu théâtral</text:span>, un motif de joie.</text:p>
      <text:p text:style-name="P3"/>
      <text:p text:style-name="P3"/>
      <text:p text:style-name="P11">Théâtre et Bien-Être</text:p>
      <text:p text:style-name="P7"><text:s/></text:p>
      <text:p text:style-name="P16">L'Atelier de <text:span text:style-name="Strong_20_Emphasis"><text:span text:style-name="T11">Théâtre et </text:span></text:span><text:span text:style-name="Strong_20_Emphasis"><text:span text:style-name="T12">Bien-être </text:span></text:span><text:span text:style-name="T14">est dirigé aux personnes qui soufrent </text:span>de troubles <text:span text:style-name="T14">d’anxiété</text:span>, de phobie sociale, de timidité excessive<text:span text:style-name="T18">, d’épuisement professionnel ou burn-out</text:span>.</text:p>
      <text:p text:style-name="P17"><text:span text:style-name="T4"/></text:p>
      <text:p text:style-name="P17"><text:span text:style-name="T4">Cet Atelier </text:span><text:span text:style-name="T3">est une approche originale qui s'oriente sur l'importance de l'expression artistique du Théâtre en tant que support psychothérapeutique.</text:span></text:p>
      <text:p text:style-name="P9"><text:soft-page-break/></text:p>
      <text:p text:style-name="P9">Le jeu théâtral, le travail de conscience corporelle et le groupe de parole sont des chemins efficaces, ludiques et créatifs qui amènent <text:span text:style-name="T14">petit à petit</text:span> à la personne vers <text:s/><text:span text:style-name="T14">la connaissance de son fonctionnement et d’un équilibre émotionnel.</text:span></text:p>
      <text:p text:style-name="P9"/>
      <text:p text:style-name="P9">Il s'agit d'explorer étape par étape, d'autres façons d'agir, de penser, de créer.</text:p>
      <text:p text:style-name="P9"/>
      <text:p text:style-name="P9">Partager son vécu dans un climat bienveillant et non-jugeant permet de prendre conscience que nous sommes jamais seuls.</text:p>
      <text:p text:style-name="P9">Ce processus vous permet de développer une force qui transforme vos zones d'ombre en atouts.</text:p>
      <text:p text:style-name="P7"/>
      <text:p text:style-name="P12">Théâtre Amateur </text:p>
      <text:p text:style-name="P12"/>
      <text:p text:style-name="P8"><text:span text:style-name="T15">L’Atelier de Théâtre Amateur est dirigé aux personnes </text:span>qui se disent <text:span text:style-name="T16">« J’ai toujours eu envie de faire du théâtre! » </text:span></text:p>
      <text:p text:style-name="P8"><text:span text:style-name="T17">et </text:span>voilà un atelier d’initiation à la pratique théâtrale pour découvrir le travail de l’acteur et votre potentiel créatif.</text:p>
      <text:p text:style-name="P13"/>
      <text:p text:style-name="P5">Cet atelier de théâtre se veut avant tout un espace ludique, un véritable laboratoire d'expérimentation où seront abordés les thèmes essentiels de l'art dramatique.</text:p>
      <text:p text:style-name="P5"/>
      <text:p text:style-name="P4">Il permettra d'explorer, entre autres, l'improvisation, la création et l'incarnation de personnages, l'interprétation des textes, la mise en scène dans l'espace, ainsi que l'utilisation créative des objets sur scène.</text:p>
      <text:p text:style-name="P13"> </text:p>
      <text:p text:style-name="P4"><text:soft-page-break/>Ce sera une immersion totale dans les multiples facettes du jeu théâtral.</text:p>
      <text:p text:style-name="P10">l’Atelier sera bouclé avec une représentation de fin d’année. <text:s/></text:p>
      <text:p text:style-name="P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ost" svg:font-family="Jost, 'Source Sans Pro', sans-serif"/>
    <style:font-face style:name="verdana" svg:font-family="verdana, genev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15T12:10:27.999000000</meta:creation-date>
    <dc:date>2026-04-28T19:17:12.772000000</dc:date>
    <meta:editing-duration>PT44M58S</meta:editing-duration>
    <meta:editing-cycles>10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21" meta:word-count="355" meta:character-count="2337" meta:non-whitespace-character-count="1989"/>
  </office:meta>
</office:document-meta>
</file>