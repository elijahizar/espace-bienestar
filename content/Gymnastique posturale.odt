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5pt" officeooo:paragraph-rsid="00048d7d" style:font-size-asian="15pt" style:font-size-complex="15pt"/>
    </style:style>
    <style:style style:name="P2" style:family="paragraph" style:parent-style-name="Standard">
      <style:text-properties style:font-name="Verdana" fo:font-size="15pt" officeooo:paragraph-rsid="0002df00" style:font-size-asian="15pt" style:font-size-complex="15pt"/>
    </style:style>
    <style:style style:name="P3" style:family="paragraph" style:parent-style-name="Standard">
      <style:text-properties style:font-name="Verdana" fo:font-size="15pt" officeooo:rsid="0002df00" officeooo:paragraph-rsid="0002df00" style:font-size-asian="15pt" style:font-size-complex="15pt"/>
    </style:style>
    <style:style style:name="P4" style:family="paragraph" style:parent-style-name="Standard">
      <style:text-properties style:font-name="Verdana" fo:font-size="15pt" fo:font-weight="bold" officeooo:rsid="00090bc4" officeooo:paragraph-rsid="00090bc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1f1f1f" style:font-name="Verdana" fo:font-size="13pt" fo:letter-spacing="normal" fo:language="fr" fo:country="FR" fo:font-style="normal" fo:font-weight="bold" officeooo:rsid="00131178" officeooo:paragraph-rsid="000af253" style:font-name-asian="NSimSun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f1f1f" style:font-name="Verdana" fo:font-size="13pt" fo:letter-spacing="normal" fo:language="fr" fo:country="FR" fo:font-style="normal" fo:font-weight="bold" officeooo:rsid="00131178" officeooo:paragraph-rsid="000af253" style:font-name-asian="NSimSun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P7" style:family="paragraph" style:parent-style-name="Standard">
      <style:text-properties style:font-name="Verdana" fo:font-size="15pt" officeooo:paragraph-rsid="00048d7d" style:font-size-asian="15pt" style:font-size-complex="15pt"/>
    </style:style>
    <style:style style:name="P8" style:family="paragraph" style:parent-style-name="Standard">
      <style:text-properties style:font-name="Verdana" fo:font-size="15pt" officeooo:paragraph-rsid="0002df00" style:font-size-asian="15pt" style:font-size-complex="15pt"/>
    </style:style>
    <style:style style:name="P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Verdana" fo:font-size="15pt" officeooo:rsid="00067fd0" officeooo:paragraph-rsid="000bc97e" style:font-size-asian="15pt" style:font-size-complex="15pt"/>
    </style:style>
    <style:style style:name="T1" style:family="text">
      <style:text-properties officeooo:rsid="00067fd0"/>
    </style:style>
    <style:style style:name="T2" style:family="text">
      <style:text-properties officeooo:rsid="0014dcca"/>
    </style:style>
    <style:style style:name="T3" style:family="text">
      <style:text-properties officeooo:rsid="001325b0"/>
    </style:style>
    <style:style style:name="T4" style:family="text">
      <style:text-properties officeooo:rsid="0002df00"/>
    </style:style>
    <style:style style:name="T5" style:family="text">
      <style:text-properties officeooo:rsid="00048d7d"/>
    </style:style>
    <style:style style:name="T6" style:family="text">
      <style:text-properties officeooo:rsid="0014102a"/>
    </style:style>
    <style:style style:name="T7" style:family="text">
      <style:text-properties officeooo:rsid="000af253"/>
    </style:style>
    <style:style style:name="T8" style:family="text">
      <style:text-properties fo:font-variant="normal" fo:text-transform="none" fo:color="#1f1f1f" fo:font-size="13pt" fo:letter-spacing="normal" fo:language="fr" fo:country="FR" fo:font-style="normal" fo:font-weight="normal" style:font-size-asian="13pt" style:font-size-complex="13pt"/>
    </style:style>
    <style:style style:name="T9" style:family="text">
      <style:text-properties fo:font-variant="normal" fo:text-transform="none" fo:color="#1f1f1f" fo:font-size="13pt" fo:letter-spacing="normal" fo:language="fr" fo:country="FR" fo:font-style="normal" fo:font-weight="normal" officeooo:rsid="0007a46a" style:font-size-asian="13pt" style:font-size-complex="13pt"/>
    </style:style>
    <style:style style:name="T10" style:family="text">
      <style:text-properties fo:font-variant="normal" fo:text-transform="none" fo:color="#1f1f1f" fo:letter-spacing="normal" fo:language="fr" fo:country="FR" fo:font-style="normal" fo:font-weight="normal"/>
    </style:style>
    <style:style style:name="T11" style:family="text">
      <style:text-properties fo:font-variant="normal" fo:text-transform="none" fo:color="#1f1f1f" fo:letter-spacing="normal" fo:language="fr" fo:country="FR" fo:font-style="normal" fo:font-weight="normal" officeooo:rsid="000bc97e"/>
    </style:style>
    <style:style style:name="T12" style:family="text">
      <style:text-properties officeooo:rsid="000bc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ymnastique Posturale</text:p>
      <text:p text:style-name="P5"/>
      <text:p text:style-name="P5"><text:span text:style-name="T12">Lundi </text:span>14h<text:span text:style-name="T7">30 </text:span>à <text:span text:style-name="T7">16h</text:span></text:p>
      <text:p text:style-name="P5"/>
      <text:p text:style-name="P6">Salle du Sporting d’Este </text:p>
      <text:p text:style-name="P6">Avenue Saint John Perse </text:p>
      <text:p text:style-name="P6">Billère <text:span text:style-name="T6">64140</text:span></text:p>
      <text:p text:style-name="P2"/>
      <text:p text:style-name="P2"><text:span text:style-name="T3">Cette Gymnastique</text:span> est une <text:span text:style-name="T4">activité</text:span> à la fois douce et rigoureuse, essentielle à une pratique <text:span text:style-name="T4">corporel saine </text:span>et durable. </text:p>
      <text:p text:style-name="P2"/>
      <text:p text:style-name="P3">Faire un travail posturale une ou deux fois par semaine devrait être une pratique de santé régulière et nécessaire, car la position <text:span text:style-name="T5">assise prolongée et le sédentarisme malmène notre dos, nos organes, nos muscles et nos articulations.</text:span> </text:p>
      <text:p text:style-name="P2"/>
      <text:p text:style-name="P1">Par fois une bonne séance de remise en place chez le kiné, bien que très nécessaire, ne suffis pas à se débarrasser des douleurs, car la principale cause des gênes et douleurs s'originent dans la mauvaise pos<text:span text:style-name="T2">ture</text:span>. Face à un écran d'ordinateur, un clavier, un portable où face à la télé la personne <text:span text:style-name="T2">répète</text:span> les mémés erreurs durant plusieurs heure d’enfilée tous les jours. </text:p>
      <text:p text:style-name="P1"/>
      <text:p text:style-name="P1">L'ennui c'est que cela entraîne plusieurs troubles posturaux, entre autres: maux de cou, de tête, des tensions dans les trapèze, cervicalgies, tendinites, sciatique, lombalgies, etc. </text:p>
      <text:p text:style-name="P1"/>
      <text:p text:style-name="P1">Ces troubles musculo-squelettiques peuvent devenir un cauchemar et empêcher <text:span text:style-name="T1">de vivre son corps en harmonie</text:span>, tout ce contre quoi la Gymnastique <text:span text:style-name="T2">Posturale </text:span>va se diriger avec sa pratique régulière, en procurant pas seulement des exercices postural, mais aussi des corrections de la posture pendant la séance, adaptées à chaque besoin et à chaque difficulté personnelle.</text:p>
      <text:p text:style-name="P9"><text:span text:style-name="T10">Les cours <text:s/>durent une heure et demi</text:span></text:p>
      <text:p text:style-name="P9"><text:span text:style-name="T10">Les participants sont pieds nus avec des vêtements confortab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28T18:50:39.595000000</meta:creation-date>
    <dc:date>2026-04-28T18:58:47.625000000</dc:date>
    <meta:editing-duration>PT6M35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2" meta:word-count="232" meta:character-count="1473" meta:non-whitespace-character-count="1246"/>
  </office:meta>
</office:document-meta>
</file>